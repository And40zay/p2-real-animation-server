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403" officeooo:paragraph-rsid="000e5403"/>
    </style:style>
    <style:style style:name="T1" style:family="text">
      <style:text-properties officeooo:rsid="000e54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Stdio.h</text:span></text:p>
      <text:p text:style-name="P1">time.h</text:p>
      <text:p text:style-name="P1">stat.h</text:p>
      <text:p text:style-name="P1">pwd.h</text:p>
      <text:p text:style-name="P1"/>
      <text:p text:style-name="P1">struct timespec{</text:p>
      <text:p text:style-name="P1">tv_sec;</text:p>
      <text:p text:style-name="P1">tv_nsec; </text:p>
      <text:p text:style-name="P1"/>
      <text:p text:style-name="P1">(time.h)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1:26:53.029246681</meta:creation-date>
    <meta:generator>LibreOffice/24.2.7.2$Linux_X86_64 LibreOffice_project/420$Build-2</meta:generator>
    <dc:date>2026-03-24T11:29:59.343774400</dc:date>
    <meta:editing-duration>PT3M7S</meta:editing-duration>
    <meta:editing-cycles>1</meta:editing-cycles>
    <meta:document-statistic meta:table-count="0" meta:image-count="0" meta:object-count="0" meta:page-count="1" meta:paragraph-count="8" meta:word-count="9" meta:character-count="65" meta:non-whitespace-character-count="62"/>
  </office:meta>
</office:document-meta>
</file>