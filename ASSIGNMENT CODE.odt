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2451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ffffff" loext:opacity="100%" style:font-name="Droid Sans Mono" fo:font-size="10.5pt" fo:font-weight="normal" fo:background-color="#002451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7285b7" loext:opacity="100%" style:font-name="Droid Sans Mono" fo:font-size="10.5pt" fo:font-weight="normal" fo:background-color="#002451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ebbbff" loext:opacity="100%"/>
    </style:style>
    <style:style style:name="T2" style:family="text">
      <style:text-properties fo:color="#d1f1a9" loext:opacity="100%"/>
    </style:style>
    <style:style style:name="T3" style:family="text">
      <style:text-properties fo:color="#ffeead" loext:opacity="100%"/>
    </style:style>
    <style:style style:name="T4" style:family="text">
      <style:text-properties fo:color="#ff9da4" loext:opacity="100%"/>
    </style:style>
    <style:style style:name="T5" style:family="text">
      <style:text-properties fo:color="#99ffff" loext:opacity="100%"/>
    </style:style>
    <style:style style:name="T6" style:family="text">
      <style:text-properties fo:color="#7285b7" loext:opacity="100%"/>
    </style:style>
    <style:style style:name="T7" style:family="text">
      <style:text-properties fo:color="#bbdaff" loext:opacity="100%"/>
    </style:style>
    <style:style style:name="T8" style:family="text">
      <style:text-properties fo:color="#ffc58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clude</text:span> <text:span text:style-name="T2">"animate.h"</text:span></text:p>
      <text:p text:style-name="P4"/>
      <text:p text:style-name="P1"><text:span text:style-name="T1">#include</text:span> <text:span text:style-name="T2">&lt;stdio.h&gt;</text:span></text:p>
      <text:p text:style-name="P1"><text:span text:style-name="T1">#include</text:span> <text:span text:style-name="T2">&lt;stdlib.h&gt;</text:span></text:p>
      <text:p text:style-name="P4"/>
      <text:p text:style-name="P1"><text:span text:style-name="T1">struct</text:span> <text:span text:style-name="T3">sprite</text:span> {</text:p>
      <text:p text:style-name="P3">// TODO</text:p>
      <text:p text:style-name="P1"><text:span text:style-name="T3">size_t</text:span> <text:span text:style-name="T4">width</text:span>;</text:p>
      <text:p text:style-name="P1"><text:span text:style-name="T3">size_t</text:span> <text:span text:style-name="T4">height</text:span>;</text:p>
      <text:p text:style-name="P1"><text:span text:style-name="T3">color_t</text:span><text:span text:style-name="T5">*</text:span> <text:span text:style-name="T4">pixels</text:span>;<text:span text:style-name="T6"> // Array of pixels for the sprite</text:span></text:p>
      <text:p text:style-name="P1"><text:span text:style-name="T7">bool</text:span> <text:span text:style-name="T4">filled</text:span>;</text:p>
      <text:p text:style-name="P1">};</text:p>
      <text:p text:style-name="P4"/>
      <text:p text:style-name="P1"><text:span text:style-name="T1">struct</text:span> <text:span text:style-name="T3">sprite_placement</text:span> {</text:p>
      <text:p text:style-name="P3">// TODO</text:p>
      <text:p text:style-name="P1"><text:span text:style-name="T1">struct</text:span> <text:span text:style-name="T3">canvas</text:span><text:span text:style-name="T5">*</text:span> <text:span text:style-name="T4">canvas</text:span>;</text:p>
      <text:p text:style-name="P1"><text:span text:style-name="T1">struct</text:span> <text:span text:style-name="T3">sprite</text:span><text:span text:style-name="T5">*</text:span> <text:span text:style-name="T4">sprite</text:span>;</text:p>
      <text:p text:style-name="P1"><text:span text:style-name="T3">size_t</text:span> <text:span text:style-name="T4">x</text:span>;</text:p>
      <text:p text:style-name="P1"><text:span text:style-name="T3">size_t</text:span> <text:span text:style-name="T4">y</text:span>;</text:p>
      <text:p text:style-name="P1"><text:span text:style-name="T3">size_t</text:span> <text:span text:style-name="T4">vx</text:span>;<text:span text:style-name="T6"> // velocity in x direction</text:span></text:p>
      <text:p text:style-name="P1"><text:span text:style-name="T3">size_t</text:span> <text:span text:style-name="T4">vy</text:span>;<text:span text:style-name="T6"> // velocity in y direction</text:span></text:p>
      <text:p text:style-name="P1"><text:span text:style-name="T3">size_t</text:span> <text:span text:style-name="T4">ax</text:span>;<text:span text:style-name="T6"> // acceleration in x direction</text:span></text:p>
      <text:p text:style-name="P1"><text:span text:style-name="T3">size_t</text:span> <text:span text:style-name="T4">ay</text:span>;<text:span text:style-name="T6"> // acceleration in y direction</text:span></text:p>
      <text:p text:style-name="P1">};</text:p>
      <text:p text:style-name="P4"/>
      <text:p text:style-name="P1"><text:span text:style-name="T1">struct</text:span> <text:span text:style-name="T3">canvas</text:span> {</text:p>
      <text:p text:style-name="P3">// TODO</text:p>
      <text:p text:style-name="P1"><text:span text:style-name="T1">int</text:span> <text:span text:style-name="T4">height</text:span>;</text:p>
      <text:p text:style-name="P1"><text:span text:style-name="T1">int</text:span> <text:span text:style-name="T4">width</text:span>;</text:p>
      <text:p text:style-name="P1"><text:span text:style-name="T3">color_t</text:span> <text:span text:style-name="T4">background_color</text:span>;</text:p>
      <text:p text:style-name="P4"/>
      <text:p text:style-name="P1">};</text:p>
      <text:p text:style-name="P5"/>
      <text:p text:style-name="P3">/* This is the header structure that we can expect to find at position 0 in a bitmap file. */</text:p>
      <text:p text:style-name="P1"><text:span text:style-name="T1">struct</text:span> <text:span text:style-name="T3">bitmap_header</text:span> </text:p>
      <text:p text:style-name="P1">{</text:p>
      <text:p text:style-name="P1"><text:span text:style-name="T3">uint8_t</text:span> <text:span text:style-name="T4">magic</text:span>[<text:span text:style-name="T8">2</text:span>];<text:span text:style-name="T6"> // Expect {'B', 'M'}</text:span></text:p>
      <text:p text:style-name="P1"><text:span text:style-name="T3">uint32_t</text:span> <text:span text:style-name="T4">size_bytes</text:span>;<text:span text:style-name="T6"> // Size of the file in bytes</text:span></text:p>
      <text:p text:style-name="P1"><text:span text:style-name="T3">uint16_t</text:span> <text:span text:style-name="T4">reserved</text:span>[<text:span text:style-name="T8">2</text:span>];</text:p>
      <text:p text:style-name="P1"><text:span text:style-name="T3">uint32_t</text:span> <text:span text:style-name="T4">pixel_offset</text:span>;<text:span text:style-name="T6"> // Starting address of pixel data</text:span></text:p>
      <text:p text:style-name="P3">// Don't pad this struct for alignment</text:p>
      <text:p text:style-name="P1">} <text:span text:style-name="T7">__attribute__</text:span>((packed));</text:p>
      <text:p text:style-name="P4"/>
      <text:p text:style-name="P3">/*</text:p>
      <text:p text:style-name="P3">* This header immediately follows bitmap_header in the file.</text:p>
      <text:p text:style-name="P3">* You may ignore all fields except bV5Width and bV5Height, unless you'd like to validate</text:p>
      <text:p text:style-name="P3">* the image format</text:p>
      <text:p text:style-name="P3">*/</text:p>
      <text:p text:style-name="P1"><text:span text:style-name="T1">struct</text:span> <text:span text:style-name="T3">bitmap5_header</text:span> {</text:p>
      <text:p text:style-name="P3"><text:soft-page-break/>// Offset Size Description</text:p>
      <text:p text:style-name="P1"><text:span text:style-name="T3">uint32_t</text:span> <text:span text:style-name="T4">bV5Size</text:span> ;<text:span text:style-name="T6"> // 0x00 4 Size of this header (124 bytes)</text:span></text:p>
      <text:p text:style-name="P1"><text:span text:style-name="T3">uint32_t</text:span> <text:span text:style-name="T4">bV5Width</text:span> ;<text:span text:style-name="T6"> // 0x04 4 Width of the bitmap in pixels</text:span></text:p>
      <text:p text:style-name="P1"><text:span text:style-name="T3">uint32_t</text:span> <text:span text:style-name="T4">bV5Height</text:span> ;<text:span text:style-name="T6"> // 0x08 4 Height of the bitmap in pixels</text:span></text:p>
      <text:p text:style-name="P1"><text:span text:style-name="T3">uint16_t</text:span> <text:span text:style-name="T4">bV5Planes</text:span> ;<text:span text:style-name="T6"> // 0x0C 2 Number of planes (must be 1)</text:span></text:p>
      <text:p text:style-name="P1"><text:span text:style-name="T3">uint16_t</text:span> <text:span text:style-name="T4">bV5BitCount</text:span> ;<text:span text:style-name="T6"> // 0x0E 2 Bits per pixel (e.g., 32)</text:span></text:p>
      <text:p text:style-name="P1"><text:span text:style-name="T3">uint32_t</text:span> <text:span text:style-name="T4">bV5Compression</text:span> ;<text:span text:style-name="T6"> // 0x10 4 BI_RGB (0), BI_BITFIELDS (3)</text:span></text:p>
      <text:p text:style-name="P1"><text:span text:style-name="T3">uint32_t</text:span> <text:span text:style-name="T4">bV5SizeImage</text:span> ;<text:span text:style-name="T6"> // 0x14 4 Size of image data (0 if uncompressed)</text:span></text:p>
      <text:p text:style-name="P1"><text:span text:style-name="T3">uint32_t</text:span> <text:span text:style-name="T4">bV5XPelsPerMeter</text:span>;<text:span text:style-name="T6"> // 0x18 4 Horizontal pixels per meter</text:span></text:p>
      <text:p text:style-name="P1"><text:span text:style-name="T3">uint32_t</text:span> <text:span text:style-name="T4">bV5YPelsPerMeter</text:span>;<text:span text:style-name="T6"> // 0x1C 4 Vertical pixels per meter</text:span></text:p>
      <text:p text:style-name="P1"><text:span text:style-name="T3">uint32_t</text:span> <text:span text:style-name="T4">bV5ClrUsed</text:span> ;<text:span text:style-name="T6"> // 0x20 4 Number of color indices used</text:span></text:p>
      <text:p text:style-name="P1"><text:span text:style-name="T3">uint32_t</text:span> <text:span text:style-name="T4">bV5ClrImportant</text:span> ;<text:span text:style-name="T6"> // 0x24 4 Number of important colors</text:span></text:p>
      <text:p text:style-name="P1"><text:span text:style-name="T3">uint32_t</text:span> <text:span text:style-name="T4">bV5RedMask</text:span> ;<text:span text:style-name="T6"> // 0x28 4 Color mask for red component</text:span></text:p>
      <text:p text:style-name="P1"><text:span text:style-name="T3">uint32_t</text:span> <text:span text:style-name="T4">bV5GreenMask</text:span> ;<text:span text:style-name="T6"> // 0x2C 4 Color mask for green component</text:span></text:p>
      <text:p text:style-name="P1"><text:span text:style-name="T3">uint32_t</text:span> <text:span text:style-name="T4">bV5BlueMask</text:span> ;<text:span text:style-name="T6"> // 0x30 4 Color mask for blue component</text:span></text:p>
      <text:p text:style-name="P1"><text:span text:style-name="T3">uint32_t</text:span> <text:span text:style-name="T4">bV5AlphaMask</text:span> ;<text:span text:style-name="T6"> // 0x34 4 Color mask for alpha channel</text:span></text:p>
      <text:p text:style-name="P1"><text:span text:style-name="T3">uint32_t</text:span> <text:span text:style-name="T4">bV5CSType</text:span> ;<text:span text:style-name="T6"> // 0x38 4 Color space type (e.g., LCS_CALIBRATED_RGB)</text:span></text:p>
      <text:p text:style-name="P1"><text:span text:style-name="T3">uint8_t</text:span> <text:span text:style-name="T4">bV5Endpoints</text:span>[<text:span text:style-name="T8">36</text:span>];<text:span text:style-name="T6"> // 0x3C-0x5B 36 CIE XYZ color space endpoints</text:span></text:p>
      <text:p text:style-name="P1"><text:span text:style-name="T3">uint32_t</text:span> <text:span text:style-name="T4">bV5GammaRed</text:span> ;<text:span text:style-name="T6"> // 0x5C 4 Gamma red component</text:span></text:p>
      <text:p text:style-name="P1"><text:span text:style-name="T3">uint32_t</text:span> <text:span text:style-name="T4">bV5GammaGreen</text:span> ;<text:span text:style-name="T6"> // 0x60 4 Gamma green component</text:span></text:p>
      <text:p text:style-name="P1"><text:span text:style-name="T3">uint32_t</text:span> <text:span text:style-name="T4">bV5GammaBlue</text:span> ;<text:span text:style-name="T6"> // 0x64 4 Gamma blue component</text:span></text:p>
      <text:p text:style-name="P1"><text:span text:style-name="T3">uint32_t</text:span> <text:span text:style-name="T4">bV5Intent</text:span> ;<text:span text:style-name="T6"> // 0x68 4 Rendering intent</text:span></text:p>
      <text:p text:style-name="P1"><text:span text:style-name="T3">uint32_t</text:span> <text:span text:style-name="T4">bV5ProfileData</text:span> ;<text:span text:style-name="T6"> // 0x6C 4 Offset to ICC profile data</text:span></text:p>
      <text:p text:style-name="P1"><text:span text:style-name="T3">uint32_t</text:span> <text:span text:style-name="T4">bV5ProfileSize</text:span> ;<text:span text:style-name="T6"> // 0x70 4 Size of embedded profile data</text:span></text:p>
      <text:p text:style-name="P1"><text:span text:style-name="T3">uint32_t</text:span> <text:span text:style-name="T4">bV5Reserved</text:span> ;<text:span text:style-name="T6"> // 0x74 4 Reserved (must be 0)</text:span></text:p>
      <text:p text:style-name="P1">};</text:p>
      <text:p text:style-name="P5"/>
      <text:p text:style-name="P1"><text:span text:style-name="T1">struct</text:span> <text:span text:style-name="T3">canvas</text:span><text:span text:style-name="T5">*</text:span> <text:span text:style-name="T7">animate_create_canvas</text:span>(<text:span text:style-name="T3">size_t</text:span> <text:span text:style-name="T8">height</text:span>, <text:span text:style-name="T3">size_t</text:span> <text:span text:style-name="T8">width</text:span>,<text:span text:style-name="T3">color_t</text:span> <text:span text:style-name="T8">background_color</text:span>)</text:p>
      <text:p text:style-name="P1">{</text:p>
      <text:p text:style-name="P3">// TODO</text:p>
      <text:p text:style-name="P1"><text:span text:style-name="T1">struct</text:span> <text:span text:style-name="T3">canvas</text:span><text:span text:style-name="T5">*</text:span> <text:span text:style-name="T4">canvas</text:span> <text:span text:style-name="T5">=</text:span> <text:span text:style-name="T7">malloc(</text:span><text:span text:style-name="T5">sizeof</text:span><text:span text:style-name="T7">(</text:span><text:span text:style-name="T1">struct</text:span><text:span text:style-name="T7"> </text:span><text:span text:style-name="T3">canvas</text:span><text:span text:style-name="T7">))</text:span>;</text:p>
      <text:p text:style-name="P1"><text:span text:style-name="T4">canvas</text:span>-&gt;<text:span text:style-name="T4">height</text:span> <text:span text:style-name="T5">=</text:span> <text:span text:style-name="T8">height</text:span>;</text:p>
      <text:p text:style-name="P1"><text:span text:style-name="T4">canvas</text:span>-&gt;<text:span text:style-name="T4">width</text:span> <text:span text:style-name="T5">=</text:span> <text:span text:style-name="T8">width</text:span>;</text:p>
      <text:p text:style-name="P1"><text:span text:style-name="T4">canvas</text:span>-&gt;<text:span text:style-name="T4">background_color</text:span> <text:span text:style-name="T5">=</text:span> <text:span text:style-name="T8">background_color</text:span>;</text:p>
      <text:p text:style-name="P1"><text:span text:style-name="T1">return</text:span> <text:span text:style-name="T4">canvas</text:span>;</text:p>
      <text:p text:style-name="P1">}</text:p>
      <text:p text:style-name="P4"/>
      <text:p text:style-name="P1"><text:span text:style-name="T1">struct</text:span> <text:span text:style-name="T3">sprite</text:span><text:span text:style-name="T5">*</text:span> <text:span text:style-name="T7">animate_create_sprite</text:span>(<text:span text:style-name="T1">const</text:span> <text:span text:style-name="T1">char</text:span><text:span text:style-name="T5">*</text:span> <text:span text:style-name="T8">file</text:span>) </text:p>
      <text:p text:style-name="P1">{</text:p>
      <text:p text:style-name="P3">// TODO</text:p>
      <text:p text:style-name="P1"><text:span text:style-name="T3">FILE</text:span> <text:span text:style-name="T5">*</text:span><text:span text:style-name="T4">fp</text:span> <text:span text:style-name="T5">=</text:span> <text:span text:style-name="T7">fopen(</text:span><text:span text:style-name="T8">file</text:span><text:span text:style-name="T7">, </text:span><text:span text:style-name="T2">"rb"</text:span><text:span text:style-name="T7">)</text:span>;</text:p>
      <text:p text:style-name="P1"><text:span text:style-name="T1">if</text:span>(<text:span text:style-name="T4">fp</text:span> <text:span text:style-name="T5">==</text:span> <text:span text:style-name="T7">NULL</text:span>)</text:p>
      <text:p text:style-name="P1">{</text:p>
      <text:p text:style-name="P1"><text:span text:style-name="T1">return</text:span> <text:span text:style-name="T7">NULL</text:span>;</text:p>
      <text:p text:style-name="P1">}</text:p>
      <text:p text:style-name="P1"><text:span text:style-name="T1">struct</text:span> <text:span text:style-name="T3">bitmap_header</text:span> <text:span text:style-name="T4">bmp_header</text:span>;</text:p>
      <text:p text:style-name="P1"><text:span text:style-name="T7">fread(</text:span><text:span text:style-name="T5">&amp;</text:span><text:span text:style-name="T4">bmp_header</text:span><text:span text:style-name="T7">, </text:span><text:span text:style-name="T5">sizeof</text:span><text:span text:style-name="T7">(</text:span><text:span text:style-name="T1">struct</text:span><text:span text:style-name="T7"> </text:span><text:span text:style-name="T3">bitmap_header</text:span><text:span text:style-name="T7">), </text:span><text:span text:style-name="T8">1</text:span><text:span text:style-name="T7">, </text:span><text:span text:style-name="T4">fp</text:span><text:span text:style-name="T7">)</text:span>;</text:p>
      <text:p text:style-name="P1"><text:span text:style-name="T1">if</text:span>(<text:span text:style-name="T4">bmp_header</text:span>.<text:span text:style-name="T4">magic</text:span>[<text:span text:style-name="T8">0</text:span>] <text:span text:style-name="T5">!=</text:span> <text:span text:style-name="T2">'B'</text:span> <text:span text:style-name="T5">||</text:span> <text:span text:style-name="T4">bmp_header</text:span>.<text:span text:style-name="T4">magic</text:span>[<text:span text:style-name="T8">1</text:span>] <text:span text:style-name="T5">!=</text:span> <text:span text:style-name="T2">'M'</text:span>)</text:p>
      <text:p text:style-name="P1">{</text:p>
      <text:p text:style-name="P1"><text:soft-page-break/><text:span text:style-name="T7">fclose(</text:span><text:span text:style-name="T4">fp</text:span><text:span text:style-name="T7">)</text:span>;</text:p>
      <text:p text:style-name="P1">}</text:p>
      <text:p text:style-name="P1"><text:span text:style-name="T1">return</text:span> <text:span text:style-name="T7">NULL</text:span>;</text:p>
      <text:p text:style-name="P1">}</text:p>
      <text:p text:style-name="P4"/>
      <text:p text:style-name="P1"><text:span text:style-name="T1">struct</text:span> <text:span text:style-name="T3">sprite</text:span><text:span text:style-name="T5">*</text:span> <text:span text:style-name="T7">animate_create_circle</text:span>(<text:span text:style-name="T3">size_t</text:span> <text:span text:style-name="T8">radius</text:span>, <text:span text:style-name="T3">color_t</text:span> <text:span text:style-name="T8">c</text:span>, <text:span text:style-name="T7">bool</text:span> <text:span text:style-name="T8">filled</text:span>) </text:p>
      <text:p text:style-name="P1">{</text:p>
      <text:p text:style-name="P3">// TODO</text:p>
      <text:p text:style-name="P1"><text:span text:style-name="T1">return</text:span> <text:span text:style-name="T7">NULL</text:span>;</text:p>
      <text:p text:style-name="P1">}</text:p>
      <text:p text:style-name="P4"/>
      <text:p text:style-name="P1"><text:span text:style-name="T1">struct</text:span> <text:span text:style-name="T3">sprite</text:span><text:span text:style-name="T5">*</text:span> <text:span text:style-name="T7">animate_create_rectangle</text:span>(<text:span text:style-name="T3">size_t</text:span> <text:span text:style-name="T8">width</text:span>, <text:span text:style-name="T3">size_t</text:span> <text:span text:style-name="T8">height</text:span>, <text:span text:style-name="T3">color_t</text:span> <text:span text:style-name="T8">c</text:span>, <text:span text:style-name="T7">bool</text:span> <text:span text:style-name="T8">filled</text:span>)</text:p>
      <text:p text:style-name="P1">{</text:p>
      <text:p text:style-name="P3">// TODO</text:p>
      <text:p text:style-name="P1"><text:span text:style-name="T1">struct</text:span> <text:span text:style-name="T3">sprite</text:span><text:span text:style-name="T5">*</text:span> <text:span text:style-name="T4">sprite</text:span> <text:span text:style-name="T5">=</text:span> <text:span text:style-name="T7">malloc(</text:span><text:span text:style-name="T5">sizeof</text:span><text:span text:style-name="T7">(</text:span><text:span text:style-name="T1">struct</text:span><text:span text:style-name="T7"> </text:span><text:span text:style-name="T3">sprite</text:span><text:span text:style-name="T7">))</text:span>;</text:p>
      <text:p text:style-name="P1"><text:span text:style-name="T4">sprite</text:span>-&gt;<text:span text:style-name="T4">width</text:span> <text:span text:style-name="T5">=</text:span> <text:span text:style-name="T8">width</text:span>;</text:p>
      <text:p text:style-name="P1"><text:span text:style-name="T4">sprite</text:span>-&gt;<text:span text:style-name="T4">height</text:span> <text:span text:style-name="T5">=</text:span> <text:span text:style-name="T8">height</text:span>;</text:p>
      <text:p text:style-name="P1"><text:span text:style-name="T4">sprite</text:span>-&gt;<text:span text:style-name="T4">filled</text:span> <text:span text:style-name="T5">=</text:span> <text:span text:style-name="T8">filled</text:span>;</text:p>
      <text:p text:style-name="P1"><text:span text:style-name="T4">sprite</text:span>-&gt;<text:span text:style-name="T4">pixels</text:span> <text:span text:style-name="T5">=</text:span> <text:span text:style-name="T7">malloc(</text:span><text:span text:style-name="T8">width</text:span><text:span text:style-name="T7"> </text:span><text:span text:style-name="T5">*</text:span><text:span text:style-name="T7"> </text:span><text:span text:style-name="T8">height</text:span><text:span text:style-name="T7"> </text:span><text:span text:style-name="T5">*</text:span><text:span text:style-name="T7"> </text:span><text:span text:style-name="T5">sizeof</text:span><text:span text:style-name="T7">(</text:span><text:span text:style-name="T3">color_t</text:span><text:span text:style-name="T7">))</text:span>;</text:p>
      <text:p text:style-name="P1"><text:span text:style-name="T1">for</text:span>(<text:span text:style-name="T3">size_t</text:span> <text:span text:style-name="T4">i</text:span> <text:span text:style-name="T5">=</text:span> <text:span text:style-name="T8">0</text:span>; <text:span text:style-name="T4">i</text:span> <text:span text:style-name="T5">&lt;</text:span> <text:span text:style-name="T8">width</text:span> <text:span text:style-name="T5">*</text:span> <text:span text:style-name="T8">height</text:span>; <text:span text:style-name="T4">i</text:span><text:span text:style-name="T5">++</text:span>)</text:p>
      <text:p text:style-name="P1">{</text:p>
      <text:p text:style-name="P1"><text:span text:style-name="T4">sprite</text:span>-&gt;<text:span text:style-name="T4">pixels</text:span>[<text:span text:style-name="T4">i</text:span>] <text:span text:style-name="T5">=</text:span> <text:span text:style-name="T8">c</text:span>;</text:p>
      <text:p text:style-name="P1">}</text:p>
      <text:p text:style-name="P1"><text:span text:style-name="T1">return</text:span> <text:span text:style-name="T4">sprite</text:span>;</text:p>
      <text:p text:style-name="P1">}</text:p>
      <text:p text:style-name="P4"/>
      <text:p text:style-name="P1"><text:span text:style-name="T7">bool</text:span> <text:span text:style-name="T7">animate_destroy_sprite</text:span>(<text:span text:style-name="T1">struct</text:span> <text:span text:style-name="T3">sprite</text:span><text:span text:style-name="T5">*</text:span> <text:span text:style-name="T8">sprite</text:span>) </text:p>
      <text:p text:style-name="P1">{</text:p>
      <text:p text:style-name="P3">// TODO</text:p>
      <text:p text:style-name="P1"><text:span text:style-name="T7">free(</text:span><text:span text:style-name="T8">sprite</text:span><text:span text:style-name="T7">-&gt;</text:span><text:span text:style-name="T4">pixels</text:span><text:span text:style-name="T7">)</text:span>;</text:p>
      <text:p text:style-name="P1"><text:span text:style-name="T7">free(</text:span><text:span text:style-name="T8">sprite</text:span><text:span text:style-name="T7">)</text:span>;</text:p>
      <text:p text:style-name="P1"><text:span text:style-name="T1">return</text:span> <text:span text:style-name="T8">1</text:span>;</text:p>
      <text:p text:style-name="P1">}</text:p>
      <text:p text:style-name="P4"/>
      <text:p text:style-name="P1"><text:span text:style-name="T1">struct</text:span> <text:span text:style-name="T3">sprite_placement</text:span><text:span text:style-name="T5">*</text:span> <text:span text:style-name="T7">animate_place_sprite</text:span>(<text:span text:style-name="T1">struct</text:span> <text:span text:style-name="T3">canvas</text:span><text:span text:style-name="T5">*</text:span> <text:span text:style-name="T8">canvas</text:span>,<text:span text:style-name="T1">struct</text:span> <text:span text:style-name="T3">sprite</text:span><text:span text:style-name="T5">*</text:span> <text:span text:style-name="T8">sprite</text:span>,<text:span text:style-name="T3">ssize_t</text:span> <text:span text:style-name="T8">x</text:span>, <text:span text:style-name="T3">ssize_t</text:span> <text:span text:style-name="T8">y</text:span>) </text:p>
      <text:p text:style-name="P1">{</text:p>
      <text:p text:style-name="P4"/>
      <text:p text:style-name="P3">// TODO</text:p>
      <text:p text:style-name="P1"><text:span text:style-name="T1">struct</text:span> <text:span text:style-name="T3">sprite_placement</text:span><text:span text:style-name="T5">*</text:span> <text:span text:style-name="T4">placement</text:span> <text:span text:style-name="T5">=</text:span> <text:span text:style-name="T7">malloc(</text:span><text:span text:style-name="T5">sizeof</text:span><text:span text:style-name="T7">(</text:span><text:span text:style-name="T1">struct</text:span><text:span text:style-name="T7"> </text:span><text:span text:style-name="T3">sprite_placement</text:span><text:span text:style-name="T7">))</text:span>;</text:p>
      <text:p text:style-name="P1"><text:span text:style-name="T4">placement</text:span>-&gt;<text:span text:style-name="T4">canvas</text:span> <text:span text:style-name="T5">=</text:span> <text:span text:style-name="T8">canvas</text:span>;</text:p>
      <text:p text:style-name="P1"><text:span text:style-name="T4">placement</text:span>-&gt;<text:span text:style-name="T4">sprite</text:span> <text:span text:style-name="T5">=</text:span> <text:span text:style-name="T8">sprite</text:span>;</text:p>
      <text:p text:style-name="P1"><text:span text:style-name="T4">placement</text:span>-&gt;<text:span text:style-name="T4">x</text:span> <text:span text:style-name="T5">=</text:span> <text:span text:style-name="T8">x</text:span>;</text:p>
      <text:p text:style-name="P1"><text:span text:style-name="T4">placement</text:span>-&gt;<text:span text:style-name="T4">y</text:span> <text:span text:style-name="T5">=</text:span> <text:span text:style-name="T8">y</text:span>;</text:p>
      <text:p text:style-name="P1"><text:span text:style-name="T1">return</text:span> <text:span text:style-name="T4">placement</text:span>;</text:p>
      <text:p text:style-name="P1">}</text:p>
      <text:p text:style-name="P4"/>
      <text:p text:style-name="P1"><text:span text:style-name="T1">void</text:span> <text:span text:style-name="T7">animate_placement_up</text:span>(<text:span text:style-name="T1">struct</text:span> <text:span text:style-name="T3">sprite_placement</text:span><text:span text:style-name="T5">*</text:span> <text:span text:style-name="T8">sprite_placement</text:span>)</text:p>
      <text:p text:style-name="P1">{</text:p>
      <text:p text:style-name="P3">// TODO COMP9017</text:p>
      <text:p text:style-name="P1"><text:soft-page-break/>}</text:p>
      <text:p text:style-name="P4"/>
      <text:p text:style-name="P1"><text:span text:style-name="T1">void</text:span> <text:span text:style-name="T7">animate_placement_down</text:span>(<text:span text:style-name="T1">struct</text:span> <text:span text:style-name="T3">sprite_placement</text:span><text:span text:style-name="T5">*</text:span> <text:span text:style-name="T8">sprite_placement</text:span>){</text:p>
      <text:p text:style-name="P3">// TODO COMP9017</text:p>
      <text:p text:style-name="P1">}</text:p>
      <text:p text:style-name="P4"/>
      <text:p text:style-name="P1"><text:span text:style-name="T1">void</text:span> <text:span text:style-name="T7">animate_placement_top</text:span>(<text:span text:style-name="T1">struct</text:span> <text:span text:style-name="T3">sprite_placement</text:span><text:span text:style-name="T5">*</text:span> <text:span text:style-name="T8">sprite_placement</text:span>)</text:p>
      <text:p text:style-name="P1">{</text:p>
      <text:p text:style-name="P3">// TODO</text:p>
      <text:p text:style-name="P1"><text:span text:style-name="T8">sprite_placement</text:span>-&gt;<text:span text:style-name="T4">y</text:span> <text:span text:style-name="T5">-=</text:span> <text:span text:style-name="T8">1</text:span>;</text:p>
      <text:p text:style-name="P1">}</text:p>
      <text:p text:style-name="P4"/>
      <text:p text:style-name="P1"><text:span text:style-name="T1">void</text:span> <text:span text:style-name="T7">animate_placement_bottom</text:span>(<text:span text:style-name="T1">struct</text:span> <text:span text:style-name="T3">sprite_placement</text:span><text:span text:style-name="T5">*</text:span> <text:span text:style-name="T8">sprite_placement</text:span>)</text:p>
      <text:p text:style-name="P1">{</text:p>
      <text:p text:style-name="P3">// TODO</text:p>
      <text:p text:style-name="P1"><text:span text:style-name="T8">sprite_placement</text:span>-&gt;<text:span text:style-name="T4">y</text:span> <text:span text:style-name="T5">+=</text:span> <text:span text:style-name="T8">1</text:span>;</text:p>
      <text:p text:style-name="P1">}</text:p>
      <text:p text:style-name="P4"/>
      <text:p text:style-name="P1"><text:span text:style-name="T1">void</text:span> <text:span text:style-name="T7">animate_destroy_placement</text:span>(<text:span text:style-name="T1">struct</text:span> <text:span text:style-name="T3">sprite_placement</text:span><text:span text:style-name="T5">*</text:span> <text:span text:style-name="T8">sprite_placement</text:span>)</text:p>
      <text:p text:style-name="P1">{</text:p>
      <text:p text:style-name="P3">// TODO</text:p>
      <text:p text:style-name="P1"><text:span text:style-name="T7">free(</text:span><text:span text:style-name="T8">sprite_placement</text:span><text:span text:style-name="T7">)</text:span>;</text:p>
      <text:p text:style-name="P1">}</text:p>
      <text:p text:style-name="P5"/>
      <text:p text:style-name="P1"><text:span text:style-name="T1">void</text:span> <text:span text:style-name="T7">animate_set_animation_params</text:span>(<text:span text:style-name="T1">struct</text:span> <text:span text:style-name="T3">sprite_placement</text:span><text:span text:style-name="T5">*</text:span> <text:span text:style-name="T8">sprite_placement</text:span>,<text:span text:style-name="T3">size_t</text:span> <text:span text:style-name="T8">vx</text:span>, <text:span text:style-name="T3">size_t</text:span> <text:span text:style-name="T8">vy</text:span>,<text:span text:style-name="T3">size_t</text:span> <text:span text:style-name="T8">ax</text:span>, <text:span text:style-name="T3">size_t</text:span> <text:span text:style-name="T8">ay</text:span>)</text:p>
      <text:p text:style-name="P1">{</text:p>
      <text:p text:style-name="P3">// TODO</text:p>
      <text:p text:style-name="P1"><text:span text:style-name="T8">sprite_placement</text:span>-&gt;<text:span text:style-name="T4">vx</text:span> <text:span text:style-name="T5">=</text:span> <text:span text:style-name="T8">vx</text:span>;</text:p>
      <text:p text:style-name="P1"><text:span text:style-name="T8">sprite_placement</text:span>-&gt;<text:span text:style-name="T4">vy</text:span> <text:span text:style-name="T5">=</text:span> <text:span text:style-name="T8">vy</text:span>;</text:p>
      <text:p text:style-name="P1"><text:span text:style-name="T8">sprite_placement</text:span>-&gt;<text:span text:style-name="T4">ax</text:span> <text:span text:style-name="T5">=</text:span> <text:span text:style-name="T8">ax</text:span>;</text:p>
      <text:p text:style-name="P1"><text:span text:style-name="T8">sprite_placement</text:span>-&gt;<text:span text:style-name="T4">ay</text:span> <text:span text:style-name="T5">=</text:span> <text:span text:style-name="T8">ay</text:span>;</text:p>
      <text:p text:style-name="P4"/>
      <text:p text:style-name="P1">}</text:p>
      <text:p text:style-name="P4"/>
      <text:p text:style-name="P1"><text:span text:style-name="T1">void</text:span> <text:span text:style-name="T7">animate_destroy_canvas</text:span>(<text:span text:style-name="T1">struct</text:span> <text:span text:style-name="T3">canvas</text:span><text:span text:style-name="T5">*</text:span> <text:span text:style-name="T8">canvas</text:span>)</text:p>
      <text:p text:style-name="P1">{</text:p>
      <text:p text:style-name="P3">// TODO</text:p>
      <text:p text:style-name="P1"><text:span text:style-name="T7">free(</text:span><text:span text:style-name="T8">canvas</text:span><text:span text:style-name="T7">)</text:span>;</text:p>
      <text:p text:style-name="P4"/>
      <text:p text:style-name="P1">}</text:p>
      <text:p text:style-name="P4"/>
      <text:p text:style-name="P1"><text:span text:style-name="T3">size_t</text:span> <text:span text:style-name="T7">animate_frame_size_bytes</text:span>(<text:span text:style-name="T1">struct</text:span> <text:span text:style-name="T3">canvas</text:span><text:span text:style-name="T5">*</text:span> <text:span text:style-name="T8">canvas</text:span>)</text:p>
      <text:p text:style-name="P1">{</text:p>
      <text:p text:style-name="P3">// TODO</text:p>
      <text:p text:style-name="P1"><text:span text:style-name="T1">return</text:span> <text:span text:style-name="T8">canvas</text:span>-&gt;<text:span text:style-name="T4">height</text:span> <text:span text:style-name="T5">*</text:span> <text:span text:style-name="T8">canvas</text:span>-&gt;<text:span text:style-name="T4">width</text:span> <text:span text:style-name="T5">*</text:span> <text:span text:style-name="T5">sizeof</text:span>(<text:span text:style-name="T3">color_t</text:span>);</text:p>
      <text:p text:style-name="P1">}</text:p>
      <text:p text:style-name="P4"/>
      <text:p text:style-name="P1"><text:soft-page-break/><text:span text:style-name="T1">void</text:span> <text:span text:style-name="T7">animate_generate_frame</text:span>(<text:span text:style-name="T1">const</text:span> <text:span text:style-name="T1">struct</text:span> <text:span text:style-name="T3">canvas</text:span><text:span text:style-name="T5">*</text:span> <text:span text:style-name="T8">canvas</text:span>, <text:span text:style-name="T3">size_t</text:span> <text:span text:style-name="T8">frame</text:span>, <text:span text:style-name="T3">size_t</text:span> <text:span text:style-name="T8">frame_rate</text:span>, <text:span text:style-name="T1">void</text:span><text:span text:style-name="T5">*</text:span> <text:span text:style-name="T8">buf</text:span>) </text:p>
      <text:p text:style-name="P1">{</text:p>
      <text:p text:style-name="P3">// TODO</text:p>
      <text:p text:style-name="P1"><text:span text:style-name="T7">memset(</text:span><text:span text:style-name="T8">buf</text:span><text:span text:style-name="T7">, </text:span><text:span text:style-name="T8">0</text:span><text:span text:style-name="T7">, animate_frame_size_bytes(</text:span><text:span text:style-name="T8">canvas</text:span><text:span text:style-name="T7">))</text:span>;</text:p>
      <text:p text:style-name="P1">}</text:p>
      <text:p text:style-name="P4"/>
      <text:p text:style-name="P3">// Optional extension</text:p>
      <text:p text:style-name="P1"><text:span text:style-name="T1">void</text:span> <text:span text:style-name="T7">animate_set_animation_function</text:span>(<text:span text:style-name="T1">struct</text:span> <text:span text:style-name="T3">sprite_placement</text:span><text:span text:style-name="T5">*</text:span> <text:span text:style-name="T8">sprite_placement</text:span>,<text:span text:style-name="T3">animate_fn</text:span>, <text:span text:style-name="T1">void</text:span><text:span text:style-name="T5">*</text:span> <text:span text:style-name="T8">priv</text:span>) </text:p>
      <text:p text:style-name="P1">{</text:p>
      <text:p text:style-name="P1">}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14:07:14.130932089</meta:creation-date>
    <dc:date>2026-03-15T08:28:05.572345896</dc:date>
    <meta:editing-duration>PT18H9M43S</meta:editing-duration>
    <meta:editing-cycles>1</meta:editing-cycles>
    <meta:document-statistic meta:table-count="0" meta:image-count="0" meta:object-count="0" meta:page-count="5" meta:paragraph-count="178" meta:word-count="739" meta:character-count="5130" meta:non-whitespace-character-count="4562"/>
    <meta:generator>LibreOffice/24.2.7.2$Linux_X86_64 LibreOffice_project/420$Build-2</meta:generator>
  </office:meta>
</office:document-meta>
</file>