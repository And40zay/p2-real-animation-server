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t /etc/*-release</text:p>
      <text:p text:style-name="Standard"/>
      <text:p text:style-name="Standard">DISTRIB_ID=LinuxMint</text:p>
      <text:p text:style-name="Standard">DISTRIB_RELEASE=22.2</text:p>
      <text:p text:style-name="Standard">DISTRIB_CODENAME=zara</text:p>
      <text:p text:style-name="Standard">DISTRIB_DESCRIPTION="Linux Mint 22.2 Zara"</text:p>
      <text:p text:style-name="Standard">NAME="Linux Mint"</text:p>
      <text:p text:style-name="Standard">VERSION="22.2 (Zara)"</text:p>
      <text:p text:style-name="Standard">ID=linuxmint</text:p>
      <text:p text:style-name="Standard">ID_LIKE="ubuntu debian"</text:p>
      <text:p text:style-name="Standard">PRETTY_NAME="Linux Mint 22.2"</text:p>
      <text:p text:style-name="Standard">VERSION_ID="22.2"</text:p>
      <text:p text:style-name="Standard">HOME_URL="https://www.linuxmint.com/"</text:p>
      <text:p text:style-name="Standard">SUPPORT_URL="https://forums.linuxmint.com/"</text:p>
      <text:p text:style-name="Standard">BUG_REPORT_URL="http://linuxmint-troubleshooting-guide.readthedocs.io/en/latest/"</text:p>
      <text:p text:style-name="Standard">PRIVACY_POLICY_URL="https://www.linuxmint.com/"</text:p>
      <text:p text:style-name="Standard">VERSION_CODENAME=zara</text:p>
      <text:p text:style-name="Standard">UBUNTU_CODENAME=noble</text:p>
      <text:p text:style-name="Standard">cat: /etc/upstream-release: Is a directory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09:25:19.566539261</meta:creation-date>
    <meta:generator>LibreOffice/24.2.7.2$Linux_X86_64 LibreOffice_project/420$Build-2</meta:generator>
    <dc:date>2026-03-14T08:49:01.653918610</dc:date>
    <meta:editing-duration>PT1H17M4S</meta:editing-duration>
    <meta:editing-cycles>7</meta:editing-cycles>
    <meta:document-statistic meta:table-count="0" meta:image-count="0" meta:object-count="0" meta:page-count="1" meta:paragraph-count="18" meta:word-count="31" meta:character-count="532" meta:non-whitespace-character-count="519"/>
  </office:meta>
</office:document-meta>
</file>