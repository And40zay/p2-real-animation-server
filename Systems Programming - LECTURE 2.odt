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37e" officeooo:paragraph-rsid="000b437e"/>
    </style:style>
    <style:style style:name="P2" style:family="paragraph" style:parent-style-name="Standard">
      <style:text-properties officeooo:rsid="000da9cd" officeooo:paragraph-rsid="000da9cd"/>
    </style:style>
    <style:style style:name="P3" style:family="paragraph" style:parent-style-name="Standard">
      <style:text-properties officeooo:rsid="000f74b2" officeooo:paragraph-rsid="000f74b2"/>
    </style:style>
    <style:style style:name="P4" style:family="paragraph" style:parent-style-name="Standard">
      <style:text-properties officeooo:rsid="000f9367" officeooo:paragraph-rsid="000f9367"/>
    </style:style>
    <style:style style:name="P5" style:family="paragraph" style:parent-style-name="Standard">
      <style:text-properties officeooo:rsid="00103128" officeooo:paragraph-rsid="00103128"/>
    </style:style>
    <style:style style:name="P6" style:family="paragraph" style:parent-style-name="Standard">
      <style:text-properties officeooo:rsid="00103128" officeooo:paragraph-rsid="00103128"/>
    </style:style>
    <style:style style:name="P7" style:family="paragraph" style:parent-style-name="Standard">
      <style:text-properties officeooo:rsid="0011d062" officeooo:paragraph-rsid="0011d062"/>
    </style:style>
    <style:style style:name="P8" style:family="paragraph" style:parent-style-name="Standard">
      <style:text-properties officeooo:rsid="0012cb8c" officeooo:paragraph-rsid="0012cb8c"/>
    </style:style>
    <style:style style:name="P9" style:family="paragraph" style:parent-style-name="Standard">
      <style:text-properties officeooo:rsid="0013cf9a" officeooo:paragraph-rsid="0013cf9a"/>
    </style:style>
    <style:style style:name="P10" style:family="paragraph" style:parent-style-name="Standard">
      <style:text-properties fo:color="#c9211e" loext:opacity="100%" officeooo:rsid="0013cf9a" officeooo:paragraph-rsid="0013cf9a"/>
    </style:style>
    <style:style style:name="P11" style:family="paragraph" style:parent-style-name="Standard">
      <style:text-properties fo:color="#c9211e" loext:opacity="100%" officeooo:rsid="0012cb8c" officeooo:paragraph-rsid="0012cb8c"/>
    </style:style>
    <style:style style:name="P12" style:family="paragraph" style:parent-style-name="Standard">
      <style:text-properties officeooo:rsid="00145797" officeooo:paragraph-rsid="00145797"/>
    </style:style>
    <style:style style:name="P13" style:family="paragraph" style:parent-style-name="Standard">
      <style:text-properties officeooo:rsid="00159051" officeooo:paragraph-rsid="00159051"/>
    </style:style>
    <style:style style:name="P14" style:family="paragraph" style:parent-style-name="Standard">
      <style:text-properties officeooo:rsid="0016d4f9" officeooo:paragraph-rsid="0016d4f9"/>
    </style:style>
    <style:style style:name="P15" style:family="paragraph" style:parent-style-name="Standard">
      <style:text-properties officeooo:rsid="0018596f" officeooo:paragraph-rsid="0018596f"/>
    </style:style>
    <style:style style:name="P16" style:family="paragraph" style:parent-style-name="Standard">
      <style:text-properties officeooo:rsid="0018b776" officeooo:paragraph-rsid="0018b776"/>
    </style:style>
    <style:style style:name="P17" style:family="paragraph" style:parent-style-name="Standard">
      <style:text-properties officeooo:rsid="0019d846" officeooo:paragraph-rsid="0019d846"/>
    </style:style>
    <style:style style:name="P18" style:family="paragraph" style:parent-style-name="Standard">
      <style:text-properties officeooo:rsid="001bb298" officeooo:paragraph-rsid="001bb298"/>
    </style:style>
    <style:style style:name="P19" style:family="paragraph" style:parent-style-name="Standard">
      <style:text-properties officeooo:rsid="001d48db" officeooo:paragraph-rsid="001d48db"/>
    </style:style>
    <style:style style:name="T1" style:family="text">
      <style:text-properties officeooo:rsid="000bd91b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9d846"/>
    </style:style>
    <style:style style:name="T5" style:family="text">
      <style:text-properties fo:color="#000000" loext:opacity="100%" officeooo:rsid="001590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rocessing language: processes everything that starts with a hash</text:p>
      <text:p text:style-name="P1"/>
      <text:p text:style-name="P1">Arduino Platform <text:span text:style-name="T1">(could buy one)</text:span></text:p>
      <text:p text:style-name="P1"/>
      <text:p text:style-name="P2">Kernel – Core of the operating system.</text:p>
      <text:p text:style-name="P2"/>
      <text:p text:style-name="P3">Gcc<text:tab/>- machine code converter</text:p>
      <text:p text:style-name="P3"/>
      <text:p text:style-name="P4">No objects in C.</text:p>
      <text:p text:style-name="P4"/>
      <text:p text:style-name="P4">C macros (#define)</text:p>
      <text:p text:style-name="P4"/>
      <text:p text:style-name="P4">conditional compilation (#if #ifdef #else #endif)</text:p>
      <text:p text:style-name="P4"/>
      <text:p text:style-name="P4"># preprocessor.</text:p>
      <text:p text:style-name="P4"/>
      <text:p text:style-name="P4">Pointers provide the memory address of variables.</text:p>
      <text:p text:style-name="P4"/>
      <text:p text:style-name="P4">Arrays can have pointers.</text:p>
      <text:p text:style-name="P4"/>
      <text:p text:style-name="P4">SizeOf opperator</text:p>
      <text:p text:style-name="P4">Malloc</text:p>
      <text:p text:style-name="P4"/>
      <text:p text:style-name="P5">Compiler is sequential. If “foo” comes afterwards, then it can’t compile it!.</text:p>
      <text:p text:style-name="P5"/>
      <text:p text:style-name="P7">Gcc -E <text:s/>main.c</text:p>
      <text:p text:style-name="P7"/>
      <text:p text:style-name="P7"/>
      <text:p text:style-name="P8">Radix</text:p>
      <text:p text:style-name="P8"/>
      <text:p text:style-name="P8">Decimal: <text:s text:c="2"/>Binary: Octal: Hex:</text:p>
      <text:p text:style-name="P8">0 <text:s text:c="11"/>: <text:s/>0 <text:s text:c="10"/>: 0 <text:s text:c="5"/>: 0</text:p>
      <text:p text:style-name="P8">1 <text:s text:c="11"/>: <text:s/>1 <text:s text:c="10"/>: 1 <text:s text:c="6"/>:1</text:p>
      <text:p text:style-name="P8">2 <text:s text:c="11"/>: <text:s/>10 <text:s text:c="8"/>: 2 <text:s text:c="6"/>:2</text:p>
      <text:p text:style-name="P8">3 <text:s text:c="11"/>: <text:s/>11 <text:s text:c="8"/>: 3 <text:s text:c="6"/>:3</text:p>
      <text:p text:style-name="P8">……</text:p>
      <text:p text:style-name="P8">9 <text:s text:c="11"/>:1001 <text:s text:c="6"/>:11 <text:s text:c="5"/>:9</text:p>
      <text:p text:style-name="P8">10 <text:s text:c="9"/>:1010 <text:s text:c="6"/>:12 <text:s text:c="5"/>:A</text:p>
      <text:p text:style-name="P8">11</text:p>
      <text:p text:style-name="P8"/>
      <text:p text:style-name="P8"/>
      <text:p text:style-name="P8">Decimal: %d or %u</text:p>
      <text:p text:style-name="P8">Binary: %b*</text:p>
      <text:p text:style-name="P8">Octal: %o</text:p>
      <text:p text:style-name="P8">Hexadecimal: %x/%X/%p</text:p>
      <text:p text:style-name="P8"/>
      <text:p text:style-name="P9">Octal – Bit of help from deepseek.</text:p>
      <text:p text:style-name="P9"/>
      <text:p text:style-name="P9">Decimal → Octal (Repeatedly divide by 8, read remainders backwards)</text:p>
      <text:p text:style-name="P9"/>
      <text:p text:style-name="P10">Let’s convert 29 (decimal) to “OCTAL”</text:p>
      <text:p text:style-name="P11"/>
      <text:p text:style-name="P10"><text:soft-page-break/>29/8 = 3 remainder 5</text:p>
      <text:p text:style-name="P10"/>
      <text:p text:style-name="P10">Keep 5!</text:p>
      <text:p text:style-name="P10"/>
      <text:p text:style-name="P9"><text:span text:style-name="T2">3/8 = 0 Remainder 3 </text:span><text:span text:style-name="T3">(If you have 3 cookies and 8 people, each person gets 0 cookies and 3 left over!)</text:span></text:p>
      <text:p text:style-name="P9"><text:span text:style-name="T3"/></text:p>
      <text:p text:style-name="P9"><text:span text:style-name="T3">“When you divide a smaller number by a larger number, the result is 0 with a remainder equal to the smaller number” – IMPORTANT!!!</text:span></text:p>
      <text:p text:style-name="P9"><text:span text:style-name="T3"/></text:p>
      <text:p text:style-name="P12"><text:span text:style-name="T3">The answer becomes: 35! (5 from the first remainder and 3 from the second remainder).</text:span></text:p>
      <text:p text:style-name="P12"><text:span text:style-name="T3"/></text:p>
      <text:p text:style-name="P12"><text:span text:style-name="T3">Let’s try with 42:</text:span></text:p>
      <text:p text:style-name="P12"><text:span text:style-name="T3"/></text:p>
      <text:p text:style-name="P12"><text:span text:style-name="T3">42/8 = 5 remainder 2 (keep 2)</text:span></text:p>
      <text:p text:style-name="P12"><text:span text:style-name="T3"/></text:p>
      <text:p text:style-name="P12"><text:span text:style-name="T3">2/8 = 0 remainder 2 (keep 2)</text:span></text:p>
      <text:p text:style-name="P12"><text:span text:style-name="T3"/></text:p>
      <text:p text:style-name="P12"><text:span text:style-name="T3">Therefore answer = 22!!!</text:span></text:p>
      <text:p text:style-name="P12"><text:span text:style-name="T3"/></text:p>
      <text:p text:style-name="P12"><text:span text:style-name="T3">WRONG!!!</text:span></text:p>
      <text:p text:style-name="P12"><text:span text:style-name="T3"/></text:p>
      <text:p text:style-name="P12"><text:span text:style-name="T3">42/8 = 5 remainder 2 (keep 2)</text:span></text:p>
      <text:p text:style-name="P12"><text:span text:style-name="T3">5/8 = 5 (keep 5) </text:span></text:p>
      <text:p text:style-name="P12"><text:span text:style-name="T3">= 52 NOT 22!!!</text:span></text:p>
      <text:p text:style-name="P12"><text:span text:style-name="T3"/></text:p>
      <text:p text:style-name="P13"><text:span text:style-name="T3">Hexadecimal is 16!</text:span></text:p>
      <text:p text:style-name="P13"><text:span text:style-name="T3"/></text:p>
      <text:p text:style-name="P13"><text:span text:style-name="T3">33 As a decimal in hexadecimal:</text:span></text:p>
      <text:p text:style-name="P13"><text:span text:style-name="T3"/></text:p>
      <text:p text:style-name="P13"><text:span text:style-name="T3">33/16 = 2 remainder 1 (keep 1)</text:span></text:p>
      <text:p text:style-name="P13"><text:span text:style-name="T3">2/16 = 0 remainder 2 (keep 2) = 21 in hexadecimal</text:span></text:p>
      <text:p text:style-name="P13"><text:span text:style-name="T3"/></text:p>
      <text:p text:style-name="P13"><text:span text:style-name="T3"/></text:p>
      <text:p text:style-name="P13"><text:span text:style-name="T3">To convert Back, use the binary method!!!!! But with 8 base (octal) or 16 base (hexadecimal)</text:span></text:p>
      <text:p text:style-name="P13"><text:span text:style-name="T3"/></text:p>
      <text:p text:style-name="P13"><text:span text:style-name="T3">1 byte = 8 bits</text:span></text:p>
      <text:p text:style-name="P13"><text:span text:style-name="T3"/></text:p>
      <text:p text:style-name="P13"><text:span text:style-name="T3">byte value 0b00110110???</text:span></text:p>
      <text:p text:style-name="P13"><text:span text:style-name="T3"/></text:p>
      <text:p text:style-name="P13"><text:span text:style-name="T3">unsigned integer? 54</text:span></text:p>
      <text:p text:style-name="P13"><text:span text:style-name="T3">machine instruction? 0X36</text:span></text:p>
      <text:p text:style-name="P13"><text:span text:style-name="T3">A memory offset or address? 0X36</text:span></text:p>
      <text:p text:style-name="P13"><text:span text:style-name="T3">RWX permissions? Octal 066 → 110110 → rw-rw-</text:span></text:p>
      <text:p text:style-name="P13"><text:span text:style-name="T3">A character? 0X36 = ‘6’</text:span></text:p>
      <text:p text:style-name="P13"><text:span text:style-name="T3"/></text:p>
      <text:p text:style-name="P13"><text:span text:style-name="T3">What about 0b11111111</text:span></text:p>
      <text:p text:style-name="P13"><text:span text:style-name="T3">Unsigned integer? 255</text:span></text:p>
      <text:p text:style-name="P13"><text:span text:style-name="T3">A signed integer? -1.</text:span></text:p>
      <text:p text:style-name="P14"><text:span text:style-name="T3"/></text:p>
      <text:p text:style-name="P14"><text:span text:style-name="T3"/></text:p>
      <text:p text:style-name="P14"><text:span text:style-name="T3">RXW – Read-Write-Execute permissions.</text:span></text:p>
      <text:p text:style-name="P14"><text:soft-page-break/><text:span text:style-name="T3"/></text:p>
      <text:p text:style-name="P14"><text:span text:style-name="T3">Unsigned 8bit integer: </text:span></text:p>
      <text:p text:style-name="P14"><text:span text:style-name="T3">11111111 → 255</text:span></text:p>
      <text:p text:style-name="P14"><text:span text:style-name="T3">00000000 → 0</text:span></text:p>
      <text:p text:style-name="P14"><text:span text:style-name="T3"/></text:p>
      <text:p text:style-name="P14"><text:span text:style-name="T3">Signed: 10000000 -128</text:span></text:p>
      <text:p text:style-name="P14"><text:span text:style-name="T3">00000000 → 0</text:span></text:p>
      <text:p text:style-name="P14"><text:span text:style-name="T3">11111111 → -1</text:span></text:p>
      <text:p text:style-name="P14"><text:span text:style-name="T3"/></text:p>
      <text:p text:style-name="P15"><text:span text:style-name="T3">Big endian: Big end first in memory</text:span></text:p>
      <text:p text:style-name="P15"><text:span text:style-name="T3">Little endian: Little end first in memory.</text:span></text:p>
      <text:p text:style-name="P15"><text:span text:style-name="T3"/></text:p>
      <text:p text:style-name="P16"><text:span text:style-name="T3">Routers prefer Big endian.</text:span></text:p>
      <text:p text:style-name="P16"><text:span text:style-name="T3"/></text:p>
      <text:p text:style-name="P16"><text:span text:style-name="T3">Most will be in little endian.</text:span></text:p>
      <text:p text:style-name="P16"><text:span text:style-name="T3"/></text:p>
      <text:p text:style-name="P16"><text:span text:style-name="T3">Float: Sign 1, Exponent 8: Fraction 23, Total 32</text:span></text:p>
      <text:p text:style-name="P16"><text:span text:style-name="T3">Double: Sign 1, Exponent: 11, Fraction 52, Total 64</text:span></text:p>
      <text:p text:style-name="P16"><text:span text:style-name="T3"/></text:p>
      <text:p text:style-name="P16"><text:span text:style-name="T3">IEEE 754 Floating point (above).</text:span></text:p>
      <text:p text:style-name="P16"><text:span text:style-name="T3"/></text:p>
      <text:p text:style-name="P16"><text:span text:style-name="T3">Declarations: label </text:span></text:p>
      <text:p text:style-name="P16"><text:span text:style-name="T3">and reserve memory:</text:span></text:p>
      <text:p text:style-name="P16"/>
      <text:p text:style-name="P16"><text:span text:style-name="T3">char myHobby[] = “chess”</text:span></text:p>
      <text:p text:style-name="P16"><text:span text:style-name="T3"/></text:p>
      <text:p text:style-name="P16"><text:span text:style-name="T3">You don’t need to put the size if you initialise.</text:span></text:p>
      <text:p text:style-name="P16"><text:span text:style-name="T3"/></text:p>
      <text:p text:style-name="P16"><text:span text:style-name="T3">Size = 6 Chess + null terminator.</text:span></text:p>
      <text:p text:style-name="P16"><text:span text:style-name="T3"/></text:p>
      <text:p text:style-name="P16"><text:span text:style-name="T3">%</text:span><text:span text:style-name="T4">ld for sizeOf()</text:span></text:p>
      <text:p text:style-name="P16"><text:span text:style-name="T4"/></text:p>
      <text:p text:style-name="P17"><text:span text:style-name="T3">Uniary – Expects 1 symbol</text:span></text:p>
      <text:p text:style-name="P17"><text:span text:style-name="T3">Binary – expects 2 operators..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8"><text:span text:style-name="T3">USING DEBUGGER:</text:span></text:p>
      <text:p text:style-name="P18"><text:span text:style-name="T3"/></text:p>
      <text:p text:style-name="P18"><text:span text:style-name="T3"/></text:p>
      <text:p text:style-name="P16"><text:span text:style-name="T3"/></text:p>
      <text:p text:style-name="P18"><text:span text:style-name="T3">gcc -g main.c</text:span></text:p>
      <text:p text:style-name="P18"><text:span text:style-name="T3">gdb</text:span><text:span text:style-name="T5"> ./</text:span><text:span text:style-name="T3">main or gdb./main.c</text:span></text:p>
      <text:p text:style-name="P18"><text:span text:style-name="T3"/></text:p>
      <text:p text:style-name="P18"><text:span text:style-name="T3">break main</text:span></text:p>
      <text:p text:style-name="P18"><text:span text:style-name="T3"/></text:p>
      <text:p text:style-name="P18"><text:span text:style-name="T3"/></text:p>
      <text:p text:style-name="P18"><text:span text:style-name="T3">r for run!</text:span></text:p>
      <text:p text:style-name="P18"><text:span text:style-name="T3"/></text:p>
      <text:p text:style-name="P19"><text:span text:style-name="T3">Pointer is always 8 bytes in size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10:08:41.521133710</meta:creation-date>
    <meta:generator>LibreOffice/24.2.7.2$Linux_X86_64 LibreOffice_project/420$Build-2</meta:generator>
    <dc:date>2026-03-08T13:54:34.903261830</dc:date>
    <meta:editing-duration>PT1H38M30S</meta:editing-duration>
    <meta:editing-cycles>11</meta:editing-cycles>
    <meta:document-statistic meta:table-count="0" meta:image-count="0" meta:object-count="0" meta:page-count="3" meta:paragraph-count="87" meta:word-count="459" meta:character-count="2610" meta:non-whitespace-character-count="2077"/>
  </office:meta>
</office:document-meta>
</file>