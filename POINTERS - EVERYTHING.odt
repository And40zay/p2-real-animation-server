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005cm" fo:margin-left="0.042cm" fo:margin-right="6.953cm" table:align="margins"/>
    </style:style>
    <style:style style:name="Table1.A" style:family="table-column">
      <style:table-column-properties style:column-width="2.473cm" style:rel-column-width="1402*"/>
    </style:style>
    <style:style style:name="Table1.B" style:family="table-column">
      <style:table-column-properties style:column-width="2.529cm" style:rel-column-width="1434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0168e2" officeooo:paragraph-rsid="000168e2"/>
    </style:style>
    <style:style style:name="P2" style:family="paragraph" style:parent-style-name="Standard">
      <style:text-properties officeooo:rsid="000312b6" officeooo:paragraph-rsid="000312b6"/>
    </style:style>
    <style:style style:name="P3" style:family="paragraph" style:parent-style-name="Standard">
      <style:text-properties officeooo:rsid="0003eb6f" officeooo:paragraph-rsid="0003eb6f"/>
    </style:style>
    <style:style style:name="P4" style:family="paragraph" style:parent-style-name="Standard">
      <style:text-properties officeooo:rsid="0005b279" officeooo:paragraph-rsid="0005b279"/>
    </style:style>
    <style:style style:name="P5" style:family="paragraph" style:parent-style-name="Standard">
      <style:text-properties officeooo:rsid="00065a96" officeooo:paragraph-rsid="00065a96"/>
    </style:style>
    <style:style style:name="T1" style:family="text">
      <style:text-properties style:text-underline-style="solid" style:text-underline-type="double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s are like apartment buildings with millions of rooms.</text:p>
      <text:p text:style-name="P1"/>
      <text:p text:style-name="P1">Each room has:</text:p>
      <text:p text:style-name="P1">1. A unique address</text:p>
      <text:p text:style-name="P1">2. Something stored inside (a number, a letter, etc.)</text:p>
      <text:p text:style-name="P1"/>
      <text:p text:style-name="P1">Address</text:p>
      <text:p text:style-name="P1"/>
      <text:p text:style-name="P1">0x1000<text:tab/>0x1001<text:tab/>0x1002<text:tab/>0x1003</text:p>
      <text:p text:style-name="P1">==========<text:tab/> ===============================</text:p>
      <text:p text:style-name="P1">|<text:tab/><text:tab/>|<text:tab/><text:tab/>|<text:tab/><text:tab/>|<text:tab/><text:tab/>|</text:p>
      <text:p text:style-name="P1">|<text:tab/><text:tab/>|<text:tab/><text:tab/>|<text:tab/><text:tab/>|<text:tab/><text:tab/>|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D1" office:value-type="string">
              <text:p text:style-name="Table_20_Contents"/>
            </table:table-cell>
          </table:table-row>
        </table:table-header-rows>
      </table:table>
      <text:p text:style-name="P1">Contents: ??<text:tab/><text:tab/>??<text:tab/><text:tab/>??<text:tab/><text:tab/>??</text:p>
      <text:p text:style-name="P1"/>
      <text:p text:style-name="P1">“WHEN YOU CREATE A VARIABLE”</text:p>
      <text:p text:style-name="P1">- “GIVE ME A ROOM, PUT THIS VALUE IN IT, LET ME CALL IT BY THIS NAME”</text:p>
      <text:p text:style-name="P1"/>
      <text:p text:style-name="P1"/>
      <text:p text:style-name="P1"/>
      <text:p text:style-name="P1">int a = 42;</text:p>
      <text:p text:style-name="P1"/>
      <text:p text:style-name="P2">ptr = 0x1000</text:p>
      <text:p text:style-name="P2">value = 42;</text:p>
      <text:p text:style-name="P2">Name = a;</text:p>
      <text:p text:style-name="P2"/>
      <text:p text:style-name="P2"/>
      <text:p text:style-name="P2">0x1000: [42] ---→ a</text:p>
      <text:p text:style-name="P2"/>
      <text:p text:style-name="P2">&amp; means “WHAT IS THE ROOM NUMBER?”</text:p>
      <text:p text:style-name="P2"/>
      <text:p text:style-name="P2">[0x1000]</text:p>
      <text:p text:style-name="P2"/>
      <text:p text:style-name="P2">printf(“%p”, &amp;a);</text:p>
      <text:p text:style-name="P2"/>
      <text:p text:style-name="P2"/>
      <text:p text:style-name="P3">POINTERS ARE VARIABLES THAT STORE ROOM NUMBERS.</text:p>
      <text:p text:style-name="P3"/>
      <text:p text:style-name="P3">Int *p = &amp;a;</text:p>
      <text:p text:style-name="P3"/>
      <text:p text:style-name="P3">1. Create a variable named “p”</text:p>
      <text:p text:style-name="P3">2. Give it a room (0x2000).</text:p>
      <text:p text:style-name="P3">3. Store the room number of a (0x1000).</text:p>
      <text:p text:style-name="P3"/>
      <text:p text:style-name="P3">0x1000 [42] --→ a</text:p>
      <text:p text:style-name="P3">0x2000: [0x1000] ---→ p (stores the address of a)</text:p>
      <text:p text:style-name="P3"/>
      <text:p text:style-name="P3">* → Derereference operator.</text:p>
      <text:p text:style-name="P3"/>
      <text:p text:style-name="P3">Printf(“%d”, *p);</text:p>
      <text:p text:style-name="P3"/>
      <text:p text:style-name="P3">GO TO THE ROOM NUMBER STORED HERE, AND LOOK INSIDE FOR THAT VARIABLE.</text:p>
      <text:p text:style-name="P3"><text:soft-page-break/></text:p>
      <text:p text:style-name="P3">“IF YOU WANT A FUNCTION TO CHANGE A VARIABLE PASS IT’s ADDRESS”</text:p>
      <text:p text:style-name="P3"/>
      <text:p text:style-name="P4">struct node *head = NULL;</text:p>
      <text:p text:style-name="P4"/>
      <text:p text:style-name="P4">head has it’s own room.</text:p>
      <text:p text:style-name="P4"/>
      <text:p text:style-name="P4">PART 2.: (→ vs .)</text:p>
      <text:p text:style-name="P4"/>
      <text:p text:style-name="P4">struct node NODE;</text:p>
      <text:p text:style-name="P4"/>
      <text:p text:style-name="P4">NODE.data = 10;</text:p>
      <text:p text:style-name="P4">NODE.next = NULL;</text:p>
      <text:p text:style-name="P4"/>
      <text:p text:style-name="P4">struct node *ptr;</text:p>
      <text:p text:style-name="P4"/>
      <text:p text:style-name="P4">ptr = &amp;my_node;</text:p>
      <text:p text:style-name="P4"/>
      <text:p text:style-name="P4">ptr→data = 20;</text:p>
      <text:p text:style-name="P4">ptr→next = NULL;</text:p>
      <text:p text:style-name="P4"/>
      <text:p text:style-name="P5">Part 3 – MEMORY ALLOCATION!!!</text:p>
      <text:p text:style-name="P5"/>
      <text:p text:style-name="P4"/>
      <text:p text:style-name="P4"/>
      <text:p text:style-name="P5">malloc = MEMORY ALLOCATION!!!</text:p>
      <text:p text:style-name="P5"/>
      <text:p text:style-name="P5">Allocates a block of memory of a specific size in bytes.</text:p>
      <text:p text:style-name="P5"/>
      <text:p text:style-name="P5">Int *arr = malloc(5 * sizeof((int));</text:p>
      <text:p text:style-name="P5"/>
      <text:p text:style-name="P5">(allocates space for 5 integers).</text:p>
      <text:p text:style-name="P5"/>
      <text:p text:style-name="P5"/>
      <text:p text:style-name="P5">Calloc() → CLEAR ALLOCATION!!!!</text:p>
      <text:p text:style-name="P5"/>
      <text:p text:style-name="P5">int *arr = calloc(5, sizeof(int));</text:p>
      <text:p text:style-name="P5"><text:line-break/>(allocates space for 5 integers, all set to 0).</text:p>
      <text:p text:style-name="P5"/>
      <text:p text:style-name="P5">(count, size) → size_t</text:p>
      <text:p text:style-name="P5"/>
      <text:p text:style-name="P5">arr = [0][0][0][0][0] (all zeros!!!).</text:p>
      <text:p text:style-name="P5"/>
      <text:p text:style-name="P5">Realloc() → RE-ALLOCATION!!!!!</text:p>
      <text:p text:style-name="P5"/>
      <text:p text:style-name="P5">int* arr = malloc(5 * sizeof(int));</text:p>
      <text:p text:style-name="P5">arr = realloc(arr, 10 * sizeof(int));</text:p>
      <text:p text:style-name="P5"/>
      <text:p text:style-name="P5">arr → [1][2][3][4][5]</text:p>
      <text:p text:style-name="P5"/>
      <text:p text:style-name="P5">relloc(arr, 8 * sizeof(int));</text:p>
      <text:p text:style-name="P5"><text:soft-page-break/>arr → [1][2][3][4][5][??][??][??].</text:p>
      <text:p text:style-name="P5"/>
      <text:p text:style-name="P5">always check:</text:p>
      <text:p text:style-name="P5">int *arr_2 = reaalloc(arr,10 * sizeof(int));</text:p>
      <text:p text:style-name="P5"/>
      <text:p text:style-name="P5">if(arr_2 != NULL)</text:p>
      <text:p text:style-name="P5">{</text:p>
      <text:p text:style-name="P5"><text:tab/>arr = new_arr;<text:line-break/>}</text:p>
      <text:p text:style-name="P5"/>
      <text:p text:style-name="P5">free(). </text:p>
      <text:p text:style-name="P5"><text:line-break/>TAKES POINTER!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6T10:35:07.730038696</meta:creation-date>
    <meta:generator>LibreOffice/24.2.7.2$Linux_X86_64 LibreOffice_project/420$Build-2</meta:generator>
    <dc:date>2026-03-26T11:09:21.024745770</dc:date>
    <meta:editing-duration>PT23M11S</meta:editing-duration>
    <meta:editing-cycles>4</meta:editing-cycles>
    <meta:document-statistic meta:table-count="1" meta:image-count="0" meta:object-count="0" meta:page-count="3" meta:paragraph-count="64" meta:word-count="311" meta:character-count="1722" meta:non-whitespace-character-count="1461"/>
  </office:meta>
</office:document-meta>
</file>