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6f3" officeooo:paragraph-rsid="0010a6f3"/>
    </style:style>
    <style:style style:name="P2" style:family="paragraph" style:parent-style-name="Standard">
      <style:text-properties officeooo:rsid="0010faf1" officeooo:paragraph-rsid="0010faf1"/>
    </style:style>
    <style:style style:name="P3" style:family="paragraph" style:parent-style-name="Standard">
      <style:text-properties officeooo:rsid="0011b601" officeooo:paragraph-rsid="0011b601"/>
    </style:style>
    <style:style style:name="P4" style:family="paragraph" style:parent-style-name="Standard">
      <style:text-properties officeooo:rsid="0013b559" officeooo:paragraph-rsid="0013b559"/>
    </style:style>
    <style:style style:name="P5" style:family="paragraph" style:parent-style-name="Standard">
      <style:text-properties fo:color="#c9211e" loext:opacity="100%" officeooo:rsid="0013b559" officeooo:paragraph-rsid="0013b559"/>
    </style:style>
    <style:style style:name="T1" style:family="text">
      <style:text-properties officeooo:rsid="0010eea1"/>
    </style:style>
    <style:style style:name="T2" style:family="text">
      <style:text-properties style:text-position="super 58%" officeooo:rsid="0010eea1"/>
    </style:style>
    <style:style style:name="T3" style:family="text">
      <style:text-properties officeooo:rsid="0010faf1"/>
    </style:style>
    <style:style style:name="T4" style:family="text">
      <style:text-properties officeooo:rsid="0011b601"/>
    </style:style>
    <style:style style:name="T5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B32 – <text:span text:style-name="T1">Three 8b values for RED, GREEN, BLUE, 4</text:span><text:span text:style-name="T2">th</text:span><text:span text:style-name="T1"> 8b value for ALPHA (tranparency).</text:span></text:p>
      <text:p text:style-name="P1"/>
      <text:p text:style-name="P1">2D Maxtrix of colour values, with each cell corresponding to a pixel position </text:p>
      <text:p text:style-name="P1"/>
      <text:p text:style-name="P1">- Referred to as a bitMap</text:p>
      <text:p text:style-name="P1"/>
      <text:p text:style-name="P1">- <text:span text:style-name="T3">Fit conveniently into one uint32_t value</text:span></text:p>
      <text:p text:style-name="P1"/>
      <text:p text:style-name="P2">ANIMATIONS:</text:p>
      <text:p text:style-name="P2"/>
      <text:p text:style-name="P2">- Combing a collection of graphical objects → Sprites (these give the illusion of motion).</text:p>
      <text:p text:style-name="P2"/>
      <text:p text:style-name="P2"/>
      <text:p text:style-name="P3">TASK:</text:p>
      <text:p text:style-name="P3"/>
      <text:p text:style-name="P3">- Develop an “animation generator backend for managing sprites”.</text:p>
      <text:p text:style-name="P3">- Constructed from either a user-provided bitmap image file in ARGB32 format or a small variety of simple shapes.</text:p>
      <text:p text:style-name="P3"/>
      <text:p text:style-name="P1">- <text:span text:style-name="T4">Must have memory efficient solution.</text:span></text:p>
      <text:p text:style-name="P1">- <text:span text:style-name="T4">Sprite Data is to be stored only once regardless of how many times it is placed in animation(s).</text:span></text:p>
      <text:p text:style-name="P1"/>
      <text:p text:style-name="P3">-Motion config in the style of a physcis engine.</text:p>
      <text:p text:style-name="P3"/>
      <text:p text:style-name="P3">- Given initial position p_0….</text:p>
      <text:p text:style-name="P3"/>
      <text:p text:style-name="P3">P = p_0 + vt + a(t^2)/2</text:p>
      <text:p text:style-name="P3"/>
      <text:p text:style-name="P3"/>
      <text:p text:style-name="P4">API: </text:p>
      <text:p text:style-name="P4"/>
      <text:p text:style-name="P4">Malloc, Calloc and realloc and free → To be used.</text:p>
      <text:p text:style-name="P4"/>
      <text:p text:style-name="P4">The following functions, where implementation is required, are expected to have execution time <text:span text:style-name="T5">complexity O(1):</text:span></text:p>
      <text:p text:style-name="P5"/>
      <text:p text:style-name="P5">- struct sprite_placement*</text:p>
      <text:p text:style-name="P5"/>
      <text:p text:style-name="P5">- animate_place sprite(struct canvas*, canvas,….);</text:p>
      <text:p text:style-name="P5"/>
      <text:p text:style-name="P5">- void animate_placement_top(struct sprite_placement*);</text:p>
      <text:p text:style-name="P5"/>
      <text:p text:style-name="P5">- void animate_placement_bottom(struct sprite_placement*);</text:p>
      <text:p text:style-name="P4"/>
      <text:p text:style-name="P4">(Note printf, also uses dynamic memory. Do not call them in your submission).</text:p>
      <text:p text:style-name="P4"/>
      <text:p text:style-name="P4">- </text:p>
      <text:p text:style-name="P4"/>
      <text:p text:style-name="P4"/>
      <text:p text:style-name="P4"/>
      <text:p text:style-name="P5">- void animate_placement_up(struct sprite_placement*);</text:p>
      <text:p text:style-name="P5"/>
      <text:p text:style-name="P5"><text:soft-page-break/>- void animate_placement_down(struct sprite_placement*);</text:p>
      <text:p text:style-name="P5"/>
      <text:p text:style-name="P4">void animate_set_animation_function(struct sprite_pacement*,…..);</text:p>
      <text:p text:style-name="P4"/>
      <text:p text:style-name="P4"/>
      <text:p text:style-name="P4">The function accepts a pointer to user defined function that should be used for calculating the approprite postion of a sprite at any time during the anim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08:22:34.374465344</meta:creation-date>
    <meta:generator>LibreOffice/24.2.7.2$Linux_X86_64 LibreOffice_project/420$Build-2</meta:generator>
    <dc:date>2026-03-14T08:46:00.489347288</dc:date>
    <meta:editing-duration>PT23M35S</meta:editing-duration>
    <meta:editing-cycles>5</meta:editing-cycles>
    <meta:document-statistic meta:table-count="0" meta:image-count="0" meta:object-count="0" meta:page-count="2" meta:paragraph-count="27" meta:word-count="225" meta:character-count="1517" meta:non-whitespace-character-count="1315"/>
  </office:meta>
</office:document-meta>
</file>